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дз1</text:p>
          </table:table-cell>
          <table:table-cell table:style-name="Default" office:value-type="string" calcext:value-type="string">
            <text:p>дз2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03.03</text:p>
          </table:table-cell>
          <table:table-cell office:value-type="string" calcext:value-type="string">
            <text:p>24.0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Ивлева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Брежнев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Прокошев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ебнев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Тюрин</text:p>
          </table:table-cell>
          <table:table-cell table:number-columns-repeated="3"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Игнатьев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Лушникова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string" calcext:value-type="string">
            <text:p>Эрбаев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Иванов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string" calcext:value-type="string">
            <text:p>Гайдамаков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Дмитриев</text:p>
          </table:table-cell>
          <table:table-cell table:number-columns-repeated="2"/>
          <table:table-cell office:value-type="string" calcext:value-type="string">
            <text:p>++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.00.0000</text:date>, <text:time style:data-style-name="N2" text:time-value="09:28:35.02583901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0:56:17.670984225</meta:creation-date>
    <dc:date>2026-05-21T09:47:31.718117689</dc:date>
    <meta:editing-duration>PT2H31M24S</meta:editing-duration>
    <meta:editing-cycles>24</meta:editing-cycles>
    <meta:generator>LibreOffice/24.2.7.2$Linux_X86_64 LibreOffice_project/420$Build-2</meta:generator>
    <meta:document-statistic meta:table-count="1" meta:cell-count="64" meta:object-count="0"/>
  </office:meta>
</office:document-meta>
</file>